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## Narrations table schema (from SQLite PRAGMA)</text:p>
          </table:table-cell>
        </table:table-row>
        <table:table-row>
          <table:table-cell office:value-type="string">
            <text:p>```</text:p>
          </table:table-cell>
        </table:table-row>
        <table:table-row>
          <table:table-cell office:value-type="string">
            <text:p>['id'</text:p>
          </table:table-cell>
          <table:table-cell office:value-type="string">
            <text:p>'position_id'</text:p>
          </table:table-cell>
          <table:table-cell office:value-type="string">
            <text:p>'model'</text:p>
          </table:table-cell>
          <table:table-cell office:value-type="string">
            <text:p>'narration'</text:p>
          </table:table-cell>
          <table:table-cell office:value-type="string">
            <text:p>'validated'</text:p>
          </table:table-cell>
          <table:table-cell office:value-type="string">
            <text:p>'created_at']</text:p>
          </table:table-cell>
        </table:table-row>
        <table:table-row>
          <table:table-cell office:value-type="string">
            <text:p>```</text:p>
          </table:table-cell>
        </table:table-row>
        <table:table-row>
          <table:table-cell office:value-type="string">
            <text:p>The INSERT in `narration.py` uses:</text:p>
          </table:table-cell>
        </table:table-row>
        <table:table-row>
          <table:table-cell office:value-type="string">
            <text:p>- **id** ✅ matches</text:p>
          </table:table-cell>
        </table:table-row>
        <table:table-row>
          <table:table-cell office:value-type="string">
            <text:p>- **fen** ❌ — actual column is `position_id`</text:p>
          </table:table-cell>
        </table:table-row>
        <table:table-row>
          <table:table-cell office:value-type="string">
            <text:p>- **move_san** ❌ — doesn't exist in table</text:p>
          </table:table-cell>
        </table:table-row>
        <table:table-row>
          <table:table-cell office:value-type="string">
            <text:p>- **eval_cp** ❌ — doesn't exist in table</text:p>
          </table:table-cell>
        </table:table-row>
        <table:table-row>
          <table:table-cell office:value-type="string">
            <text:p>- **text** ❌ — actual column is `narration`</text:p>
          </table:table-cell>
        </table:table-row>
        <table:table-row>
          <table:table-cell office:value-type="string">
            <text:p>- **grounded** ❌ — actual column is `validated`</text:p>
          </table:table-cell>
        </table:table-row>
        <table:table-row>
          <table:table-cell office:value-type="string">
            <text:p>- **player_name** ❌ — doesn't exist in table</text:p>
          </table:table-cell>
        </table:table-row>
        <table:table-row>
          <table:table-cell office:value-type="string">
            <text:p>- **created_at** ✅ matches</text:p>
          </table:table-cell>
        </table:table-row>
        <table:table-row>
          <table:table-cell office:value-type="string">
            <text:p>Need to fix the INSERT to match the actual schema before the curl test will work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