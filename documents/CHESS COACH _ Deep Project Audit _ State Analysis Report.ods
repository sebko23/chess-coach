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spreadsheet>
      <table:table table:name="Sheet1">
        <table:table-row>
          <table:table-cell office:value-type="string">
            <text:p>Metric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otal Python files</text:p>
          </table:table-cell>
          <table:table-cell office:value-type="float" office:value="71">
            <text:p>71</text:p>
          </table:table-cell>
        </table:table-row>
        <table:table-row>
          <table:table-cell office:value-type="string">
            <text:p>Total route file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Largest route</text:p>
          </table:table-cell>
          <table:table-cell office:value-type="string">
            <text:p>`training_planner.py` (239 lines, 3 functions)</text:p>
          </table:table-cell>
        </table:table-row>
        <table:table-row>
          <table:table-cell office:value-type="string">
            <text:p>Largest lib file</text:p>
          </table:table-cell>
          <table:table-cell office:value-type="string">
            <text:p>`uci/engine.py` (293 lines)</text:p>
          </table:table-cell>
        </table:table-row>
        <table:table-row>
          <table:table-cell office:value-type="string">
            <text:p>Module imports</text:p>
          </table:table-cell>
          <table:table-cell office:value-type="string">
            <text:p>9/9 OK — no circular dependencies</text:p>
          </table:table-cell>
        </table:table-row>
        <table:table-row>
          <table:table-cell office:value-type="string">
            <text:p>Bare `except:` clauses</text:p>
          </table:table-cell>
          <table:table-cell office:value-type="string">
            <text:p>**0** (good)</text:p>
          </table:table-cell>
        </table:table-row>
        <table:table-row>
          <table:table-cell office:value-type="string">
            <text:p>TODO/FIXME/HACK</text:p>
          </table:table-cell>
          <table:table-cell office:value-type="string">
            <text:p>1 TODO in `embedder.py`</text:p>
          </table:table-cell>
        </table:table-row>
        <table:table-row>
          <table:table-cell office:value-type="string">
            <text:p>`pass` statements</text:p>
          </table:table-cell>
          <table:table-cell office:value-type="string">
            <text:p>7 (mostly in exception handlers, acceptable)</text:p>
          </table:table-cell>
        </table:table-row>
        <table:table-row>
          <table:table-cell office:value-type="string">
            <text:p>NotImplementedYetError</text:p>
          </table:table-cell>
          <table:table-cell office:value-type="string">
            <text:p>1 custom error class defined</text:p>
          </table:table-cell>
        </table:table-row>
        <table:table-row>
          <table:table-cell office:value-type="string">
            <text:p>Routes with 0 try blocks</text:p>
          </table:table-cell>
          <table:table-cell office:value-type="string">
            <text:p>**7/16** (blunder_routes, eval_graph, game_routes, players, profile, profile_analysis, training)</text:p>
          </table:table-cell>
        </table:table-row>
        <table:table-row>
          <table:table-cell office:value-type="string">
            <text:p>try blocks</text:p>
          </table:table-cell>
          <table:table-cell office:value-type="string">
            <text:p>Routes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lichess_import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df_inges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nalysis, repertoire_recommendations, engine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narration, training_planner</text:p>
          </table:table-cell>
        </table:table-row>
        <table:table-row>
          <table:table-cell office:value-type="float" office:value="0">
            <text:p>0</text:p>
          </table:table-cell>
          <table:table-cell office:value-type="string">
            <text:p>blunder_routes, eval_graph, game_routes, players, profile, profile_analysis, system, training</text:p>
          </table:table-cell>
        </table:table-row>
        <table:table-row>
          <table:table-cell office:value-type="string">
            <text:p>Metric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otal TS/TSX files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>
            <text:p>Coach panel file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Largest file</text:p>
          </table:table-cell>
          <table:table-cell office:value-type="string">
            <text:p>`services/coach/api.ts` (1,905 lines)</text:p>
          </table:table-cell>
        </table:table-row>
        <table:table-row>
          <table:table-cell office:value-type="string">
            <text:p>Largest panel</text:p>
          </table:table-cell>
          <table:table-cell office:value-type="string">
            <text:p>`PracticePanel.tsx` (937 lines)</text:p>
          </table:table-cell>
        </table:table-row>
        <table:table-row>
          <table:table-cell office:value-type="string">
            <text:p>Hand-written fetch calls</text:p>
          </table:table-cell>
          <table:table-cell office:value-type="string">
            <text:p>**0** (all migrated to typed client)</text:p>
          </table:table-cell>
        </table:table-row>
        <table:table-row>
          <table:table-cell office:value-type="string">
            <text:p>`any` type usages in panels</text:p>
          </table:table-cell>
          <table:table-cell office:value-type="string">
            <text:p>Not counted (audit incomplete)</text:p>
          </table:table-cell>
        </table:table-row>
        <table:table-row>
          <table:table-cell office:value-type="string">
            <text:p>Zustand usage in panels</text:p>
          </table:table-cell>
          <table:table-cell office:value-type="string">
            <text:p>**0** (Jotai only per ADR-0005)</text:p>
          </table:table-cell>
        </table:table-row>
        <table:table-row>
          <table:table-cell office:value-type="string">
            <text:p>i18n calls in panels</text:p>
          </table:table-cell>
          <table:table-cell office:value-type="string">
            <text:p>**0** (not implemented for coach panels)</text:p>
          </table:table-cell>
        </table:table-row>
        <table:table-row>
          <table:table-cell office:value-type="string">
            <text:p>playerName hardcoding</text:p>
          </table:table-cell>
          <table:table-cell office:value-type="string">
            <text:p>Only in `playerAtom.ts` default value ("ebassti")</text:p>
          </table:table-cell>
        </table:table-row>
        <table:table-row>
          <table:table-cell office:value-type="string">
            <text:p>Metric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est file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Total test lines</text:p>
          </table:table-cell>
          <table:table-cell office:value-type="string">
            <text:p>~1,058</text:p>
          </table:table-cell>
        </table:table-row>
        <table:table-row>
          <table:table-cell office:value-type="string">
            <text:p>Route test coverage</text:p>
          </table:table-cell>
          <table:table-cell office:value-type="string">
            <text:p>**2/16 (12.5%)**</text:p>
          </table:table-cell>
        </table:table-row>
        <table:table-row>
          <table:table-cell office:value-type="string">
            <text:p>Untested routes</text:p>
          </table:table-cell>
          <table:table-cell office:value-type="string">
            <text:p>analysis, blunder_routes, engines, eval_graph, game_routes, lichess_import, pdf_ingest, players, profile, profile_analysis, repertoire, repertoire_recommendations, training, training_planner</text:p>
          </table:table-cell>
        </table:table-row>
        <table:table-row>
          <table:table-cell office:value-type="string">
            <text:p>Frontend tests</text:p>
          </table:table-cell>
          <table:table-cell office:value-type="string">
            <text:p>**0**</text:p>
          </table:table-cell>
        </table:table-row>
        <table:table-row>
          <table:table-cell office:value-type="string">
            <text:p>E2E tests</text:p>
          </table:table-cell>
          <table:table-cell office:value-type="string">
            <text:p>**0**</text:p>
          </table:table-cell>
        </table:table-row>
        <table:table-row>
          <table:table-cell office:value-type="string">
            <text:p>Module</text:p>
          </table:table-cell>
          <table:table-cell office:value-type="string">
            <text:p>Status</text:p>
          </table:table-cell>
          <table:table-cell office:value-type="string">
            <text:p>Line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Gateway (FastAPI)</text:p>
          </table:table-cell>
          <table:table-cell office:value-type="string">
            <text:p>✅ Active</text:p>
          </table:table-cell>
          <table:table-cell office:value-type="string">
            <text:p>~1,600</text:p>
          </table:table-cell>
          <table:table-cell office:value-type="string">
            <text:p>16 routes, auth, exception handlers</text:p>
          </table:table-cell>
        </table:table-row>
        <table:table-row>
          <table:table-cell office:value-type="string">
            <text:p>Chess Analysis</text:p>
          </table:table-cell>
          <table:table-cell office:value-type="string">
            <text:p>✅ Active</text:p>
          </table:table-cell>
          <table:table-cell office:value-type="float" office:value="293">
            <text:p>293</text:p>
          </table:table-cell>
          <table:table-cell office:value-type="string">
            <text:p>UCI engine wrapper, Stockfish 18</text:p>
          </table:table-cell>
        </table:table-row>
        <table:table-row>
          <table:table-cell office:value-type="string">
            <text:p>Engine Orchestrator</text:p>
          </table:table-cell>
          <table:table-cell office:value-type="string">
            <text:p>✅ Active</text:p>
          </table:table-cell>
          <table:table-cell office:value-type="float" office:value="180">
            <text:p>180</text:p>
          </table:table-cell>
          <table:table-cell office:value-type="string">
            <text:p>Pool management</text:p>
          </table:table-cell>
        </table:table-row>
        <table:table-row>
          <table:table-cell office:value-type="string">
            <text:p>Psychological Profile</text:p>
          </table:table-cell>
          <table:table-cell office:value-type="string">
            <text:p>✅ Active</text:p>
          </table:table-cell>
          <table:table-cell office:value-type="float" office:value="214">
            <text:p>214</text:p>
          </table:table-cell>
          <table:table-cell office:value-type="string">
            <text:p>Profile + profile_analysis routes</text:p>
          </table:table-cell>
        </table:table-row>
        <table:table-row>
          <table:table-cell office:value-type="string">
            <text:p>Training Planner</text:p>
          </table:table-cell>
          <table:table-cell office:value-type="string">
            <text:p>✅ Active</text:p>
          </table:table-cell>
          <table:table-cell office:value-type="float" office:value="449">
            <text:p>449</text:p>
          </table:table-cell>
          <table:table-cell office:value-type="string">
            <text:p>Training + training_planner routes</text:p>
          </table:table-cell>
        </table:table-row>
        <table:table-row>
          <table:table-cell office:value-type="string">
            <text:p>Repertoire</text:p>
          </table:table-cell>
          <table:table-cell office:value-type="string">
            <text:p>✅ Active</text:p>
          </table:table-cell>
          <table:table-cell office:value-type="float" office:value="250">
            <text:p>250</text:p>
          </table:table-cell>
          <table:table-cell office:value-type="string">
            <text:p>Repertoire + recommendations routes</text:p>
          </table:table-cell>
        </table:table-row>
        <table:table-row>
          <table:table-cell office:value-type="string">
            <text:p>Narration</text:p>
          </table:table-cell>
          <table:table-cell office:value-type="string">
            <text:p>✅ Active</text:p>
          </table:table-cell>
          <table:table-cell office:value-type="float" office:value="234">
            <text:p>234</text:p>
          </table:table-cell>
          <table:table-cell office:value-type="string">
            <text:p>Pipeline + validator + prompt</text:p>
          </table:table-cell>
        </table:table-row>
        <table:table-row>
          <table:table-cell office:value-type="string">
            <text:p>Memory KB</text:p>
          </table:table-cell>
          <table:table-cell office:value-type="string">
            <text:p>✅ Active</text:p>
          </table:table-cell>
          <table:table-cell office:value-type="float" office:value="276">
            <text:p>276</text:p>
          </table:table-cell>
          <table:table-cell office:value-type="string">
            <text:p>Store + embedder + pipeline</text:p>
          </table:table-cell>
        </table:table-row>
        <table:table-row>
          <table:table-cell office:value-type="string">
            <text:p>LLM Router</text:p>
          </table:table-cell>
          <table:table-cell office:value-type="string">
            <text:p>✅ Active</text:p>
          </table:table-cell>
          <table:table-cell office:value-type="float" office:value="74">
            <text:p>74</text:p>
          </table:table-cell>
          <table:table-cell office:value-type="string">
            <text:p>OpenRouter integration</text:p>
          </table:table-cell>
        </table:table-row>
        <table:table-row>
          <table:table-cell office:value-type="string">
            <text:p>PDF/Vision</text:p>
          </table:table-cell>
          <table:table-cell office:value-type="string">
            <text:p>✅ Active</text:p>
          </table:table-cell>
          <table:table-cell office:value-type="float" office:value="189">
            <text:p>189</text:p>
          </table:table-cell>
          <table:table-cell office:value-type="string">
            <text:p>chessvision.ai integration</text:p>
          </table:table-cell>
        </table:table-row>
        <table:table-row>
          <table:table-cell office:value-type="string">
            <text:p>Jobs Queue</text:p>
          </table:table-cell>
          <table:table-cell office:value-type="string">
            <text:p>🔶 Stub</text:p>
          </table:table-cell>
          <table:table-cell office:value-type="float" office:value="0">
            <text:p>0</text:p>
          </table:table-cell>
          <table:table-cell office:value-type="string">
            <text:p>`__init__.py` only</text:p>
          </table:table-cell>
        </table:table-row>
        <table:table-row>
          <table:table-cell office:value-type="string">
            <text:p>Analysis Service</text:p>
          </table:table-cell>
          <table:table-cell office:value-type="string">
            <text:p>🔶 Stub</text:p>
          </table:table-cell>
          <table:table-cell office:value-type="float" office:value="0">
            <text:p>0</text:p>
          </table:table-cell>
          <table:table-cell office:value-type="string">
            <text:p>`__init__.py` only</text:p>
          </table:table-cell>
        </table:table-row>
        <table:table-row>
          <table:table-cell office:value-type="string">
            <text:p>Debug Agent</text:p>
          </table:table-cell>
          <table:table-cell office:value-type="string">
            <text:p>🔶 Stub</text:p>
          </table:table-cell>
          <table:table-cell office:value-type="float" office:value="0">
            <text:p>0</text:p>
          </table:table-cell>
          <table:table-cell office:value-type="string">
            <text:p>`__init__.py` only</text:p>
          </table:table-cell>
        </table:table-row>
        <table:table-row>
          <table:table-cell office:value-type="string">
            <text:p>Synchronization</text:p>
          </table:table-cell>
          <table:table-cell office:value-type="string">
            <text:p>🔶 Stub</text:p>
          </table:table-cell>
          <table:table-cell office:value-type="float" office:value="0">
            <text:p>0</text:p>
          </table:table-cell>
          <table:table-cell office:value-type="string">
            <text:p>Not yet created</text:p>
          </table:table-cell>
        </table:table-row>
        <table:table-row>
          <table:table-cell office:value-type="string">
            <text:p>ADR</text:p>
          </table:table-cell>
          <table:table-cell office:value-type="string">
            <text:p>Title</text:p>
          </table:table-cell>
          <table:table-cell office:value-type="string">
            <text:p>Compliance</text:p>
          </table:table-cell>
        </table:table-row>
        <table:table-row>
          <table:table-cell office:value-type="string">
            <text:p>ADR-0001</text:p>
          </table:table-cell>
          <table:table-cell office:value-type="string">
            <text:p>Async/Sync Boundary</text:p>
          </table:table-cell>
          <table:table-cell office:value-type="string">
            <text:p>✅ All routes async, UCI sync boundary respected</text:p>
          </table:table-cell>
        </table:table-row>
        <table:table-row>
          <table:table-cell office:value-type="string">
            <text:p>ADR-0002</text:p>
          </table:table-cell>
          <table:table-cell office:value-type="string">
            <text:p>Error Envelope</text:p>
          </table:table-cell>
          <table:table-cell office:value-type="string">
            <text:p>✅ Consistent error response format</text:p>
          </table:table-cell>
        </table:table-row>
        <table:table-row>
          <table:table-cell office:value-type="string">
            <text:p>ADR-0003</text:p>
          </table:table-cell>
          <table:table-cell office:value-type="string">
            <text:p>Schema Evolution</text:p>
          </table:table-cell>
          <table:table-cell office:value-type="string">
            <text:p>✅ Migrations via `migrate.py`, user_version=7</text:p>
          </table:table-cell>
        </table:table-row>
        <table:table-row>
          <table:table-cell office:value-type="string">
            <text:p>ADR-0004</text:p>
          </table:table-cell>
          <table:table-cell office:value-type="string">
            <text:p>License Posture</text:p>
          </table:table-cell>
          <table:table-cell office:value-type="string">
            <text:p>✅ GPL-3.0-only, UPSTREAM.md maintained</text:p>
          </table:table-cell>
        </table:table-row>
        <table:table-row>
          <table:table-cell office:value-type="string">
            <text:p>ADR-0005</text:p>
          </table:table-cell>
          <table:table-cell office:value-type="string">
            <text:p>Coach State Jotai</text:p>
          </table:table-cell>
          <table:table-cell office:value-type="string">
            <text:p>✅ All coach panels use Jotai atoms, no Zustand</text:p>
          </table:table-cell>
        </table:table-row>
        <table:table-row>
          <table:table-cell office:value-type="string">
            <text:p>Table</text:p>
          </table:table-cell>
          <table:table-cell office:value-type="string">
            <text:p>Row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positions</text:p>
          </table:table-cell>
          <table:table-cell office:value-type="string">
            <text:p>25,948</text:p>
          </table:table-cell>
          <table:table-cell office:value-type="string">
            <text:p>Core position tree</text:p>
          </table:table-cell>
        </table:table-row>
        <table:table-row>
          <table:table-cell office:value-type="string">
            <text:p>analyses</text:p>
          </table:table-cell>
          <table:table-cell office:value-type="string">
            <text:p>24,962</text:p>
          </table:table-cell>
          <table:table-cell office:value-type="string">
            <text:p>Engine analysis results</text:p>
          </table:table-cell>
        </table:table-row>
        <table:table-row>
          <table:table-cell office:value-type="string">
            <text:p>jobs</text:p>
          </table:table-cell>
          <table:table-cell office:value-type="string">
            <text:p>25,397</text:p>
          </table:table-cell>
          <table:table-cell office:value-type="string">
            <text:p>Background job queue</text:p>
          </table:table-cell>
        </table:table-row>
        <table:table-row>
          <table:table-cell office:value-type="string">
            <text:p>training_cards</text:p>
          </table:table-cell>
          <table:table-cell office:value-type="string">
            <text:p>3,739</text:p>
          </table:table-cell>
          <table:table-cell office:value-type="string">
            <text:p>Spaced repetition cards</text:p>
          </table:table-cell>
        </table:table-row>
        <table:table-row>
          <table:table-cell office:value-type="string">
            <text:p>analysis_cache</text:p>
          </table:table-cell>
          <table:table-cell office:value-type="string">
            <text:p>7,594</text:p>
          </table:table-cell>
          <table:table-cell office:value-type="string">
            <text:p>Cached analysis results</text:p>
          </table:table-cell>
        </table:table-row>
        <table:table-row>
          <table:table-cell office:value-type="string">
            <text:p>games</text:p>
          </table:table-cell>
          <table:table-cell office:value-type="float" office:value="551">
            <text:p>551</text:p>
          </table:table-cell>
          <table:table-cell office:value-type="string">
            <text:p>Imported games</text:p>
          </table:table-cell>
        </table:table-row>
        <table:table-row>
          <table:table-cell office:value-type="string">
            <text:p>pdf_import_diagrams</text:p>
          </table:table-cell>
          <table:table-cell office:value-type="float" office:value="150">
            <text:p>150</text:p>
          </table:table-cell>
          <table:table-cell office:value-type="string">
            <text:p>Extracted chess diagrams</text:p>
          </table:table-cell>
        </table:table-row>
        <table:table-row>
          <table:table-cell office:value-type="string">
            <text:p>pdf_imports</text:p>
          </table:table-cell>
          <table:table-cell office:value-type="float" office:value="8">
            <text:p>8</text:p>
          </table:table-cell>
          <table:table-cell office:value-type="string">
            <text:p>PDF import records</text:p>
          </table:table-cell>
        </table:table-row>
        <table:table-row>
          <table:table-cell office:value-type="string">
            <text:p>narrations</text:p>
          </table:table-cell>
          <table:table-cell office:value-type="float" office:value="0">
            <text:p>0</text:p>
          </table:table-cell>
          <table:table-cell office:value-type="string">
            <text:p>**Empty — narration pipeline not generating records**</text:p>
          </table:table-cell>
        </table:table-row>
        <table:table-row>
          <table:table-cell office:value-type="string">
            <text:p>repertoire_cache</text:p>
          </table:table-cell>
          <table:table-cell office:value-type="float" office:value="0">
            <text:p>0</text:p>
          </table:table-cell>
          <table:table-cell office:value-type="string">
            <text:p>**Empty — not yet populated**</text:p>
          </table:table-cell>
        </table:table-row>
        <table:table-row>
          <table:table-cell office:value-type="string">
            <text:p>meta</text:p>
          </table:table-cell>
          <table:table-cell office:value-type="float" office:value="4">
            <text:p>4</text:p>
          </table:table-cell>
          <table:table-cell office:value-type="string">
            <text:p>Schema metadata</text:p>
          </table:table-cell>
        </table:table-row>
        <table:table-row>
          <table:table-cell office:value-type="string">
            <text:p>Check</text:p>
          </table:table-cell>
          <table:table-cell office:value-type="string">
            <text:p>Result</text:p>
          </table:table-cell>
        </table:table-row>
        <table:table-row>
          <table:table-cell office:value-type="string">
            <text:p>Null move_san (ply&gt;0)</text:p>
          </table:table-cell>
          <table:table-cell office:value-type="string">
            <text:p>**0**</text:p>
          </table:table-cell>
        </table:table-row>
        <table:table-row>
          <table:table-cell office:value-type="string">
            <text:p>Null FEN</text:p>
          </table:table-cell>
          <table:table-cell office:value-type="string">
            <text:p>**0**</text:p>
          </table:table-cell>
        </table:table-row>
        <table:table-row>
          <table:table-cell office:value-type="string">
            <text:p>Orphan positions</text:p>
          </table:table-cell>
          <table:table-cell office:value-type="string">
            <text:p>**0**</text:p>
          </table:table-cell>
        </table:table-row>
        <table:table-row>
          <table:table-cell office:value-type="string">
            <text:p>Orphan analyses</text:p>
          </table:table-cell>
          <table:table-cell office:value-type="string">
            <text:p>**0**</text:p>
          </table:table-cell>
        </table:table-row>
        <table:table-row>
          <table:table-cell office:value-type="string">
            <text:p>Training cards due</text:p>
          </table:table-cell>
          <table:table-cell office:value-type="string">
            <text:p>3,738 (99.7% of all cards)</text:p>
          </table:table-cell>
        </table:table-row>
        <table:table-row>
          <table:table-cell office:value-type="string">
            <text:p>Engine</text:p>
          </table:table-cell>
          <table:table-cell office:value-type="string">
            <text:p>Version</text:p>
          </table:table-cell>
          <table:table-cell office:value-type="string">
            <text:p>Path</text:p>
          </table:table-cell>
        </table:table-row>
        <table:table-row>
          <table:table-cell office:value-type="string">
            <text:p>Stockfish 18</text:p>
          </table:table-cell>
          <table:table-cell office:value-type="string">
            <text:p>Latest</text:p>
          </table:table-cell>
          <table:table-cell office:value-type="string">
            <text:p>`/usr/local/bin/stockfish`</text:p>
          </table:table-cell>
        </table:table-row>
        <table:table-row>
          <table:table-cell office:value-type="string">
            <text:p>lc0</text:p>
          </table:table-cell>
          <table:table-cell office:value-type="string">
            <text:p>❌ Not installed</text:p>
          </table:table-cell>
          <table:table-cell office:value-type="string">
            <text:p>—</text:p>
          </table:table-cell>
        </table:table-row>
        <table:table-row>
          <table:table-cell office:value-type="string">
            <text:p>Maia</text:p>
          </table:table-cell>
          <table:table-cell office:value-type="string">
            <text:p>❌ Not installed</text:p>
          </table:table-cell>
          <table:table-cell office:value-type="string">
            <text:p>— (but UCI-compatible via lc0 when added)</text:p>
          </table:table-cell>
        </table:table-row>
        <table:table-row>
          <table:table-cell office:value-type="string">
            <text:p>Package</text:p>
          </table:table-cell>
          <table:table-cell office:value-type="string">
            <text:p>Version</text:p>
          </table:table-cell>
          <table:table-cell office:value-type="string">
            <text:p>Purpose</text:p>
          </table:table-cell>
        </table:table-row>
        <table:table-row>
          <table:table-cell office:value-type="string">
            <text:p>fastapi</text:p>
          </table:table-cell>
          <table:table-cell office:value-type="string">
            <text:p>0.136.3</text:p>
          </table:table-cell>
          <table:table-cell office:value-type="string">
            <text:p>HTTP framework</text:p>
          </table:table-cell>
        </table:table-row>
        <table:table-row>
          <table:table-cell office:value-type="string">
            <text:p>uvicorn</text:p>
          </table:table-cell>
          <table:table-cell office:value-type="string">
            <text:p>0.49.0</text:p>
          </table:table-cell>
          <table:table-cell office:value-type="string">
            <text:p>ASGI server</text:p>
          </table:table-cell>
        </table:table-row>
        <table:table-row>
          <table:table-cell office:value-type="string">
            <text:p>chess</text:p>
          </table:table-cell>
          <table:table-cell office:value-type="string">
            <text:p>1.11.2</text:p>
          </table:table-cell>
          <table:table-cell office:value-type="string">
            <text:p>Chess logic/FEN validation</text:p>
          </table:table-cell>
        </table:table-row>
        <table:table-row>
          <table:table-cell office:value-type="string">
            <text:p>torch</text:p>
          </table:table-cell>
          <table:table-cell office:value-type="string">
            <text:p>2.12.0+cpu</text:p>
          </table:table-cell>
          <table:table-cell office:value-type="string">
            <text:p>ML inference (embeddings)</text:p>
          </table:table-cell>
        </table:table-row>
        <table:table-row>
          <table:table-cell office:value-type="string">
            <text:p>sentence-transformers</text:p>
          </table:table-cell>
          <table:table-cell office:value-type="string">
            <text:p>5.5.1</text:p>
          </table:table-cell>
          <table:table-cell office:value-type="string">
            <text:p>Text embeddings</text:p>
          </table:table-cell>
        </table:table-row>
        <table:table-row>
          <table:table-cell office:value-type="string">
            <text:p>qdrant-client</text:p>
          </table:table-cell>
          <table:table-cell office:value-type="string">
            <text:p>1.18.0</text:p>
          </table:table-cell>
          <table:table-cell office:value-type="string">
            <text:p>Vector storage</text:p>
          </table:table-cell>
        </table:table-row>
        <table:table-row>
          <table:table-cell office:value-type="string">
            <text:p>httpx</text:p>
          </table:table-cell>
          <table:table-cell office:value-type="string">
            <text:p>0.28.1</text:p>
          </table:table-cell>
          <table:table-cell office:value-type="string">
            <text:p>Async HTTP (chessvision.ai)</text:p>
          </table:table-cell>
        </table:table-row>
        <table:table-row>
          <table:table-cell office:value-type="string">
            <text:p>opencv-python-headless</text:p>
          </table:table-cell>
          <table:table-cell office:value-type="string">
            <text:p>4.13.0</text:p>
          </table:table-cell>
          <table:table-cell office:value-type="string">
            <text:p>Image processing</text:p>
          </table:table-cell>
        </table:table-row>
        <table:table-row>
          <table:table-cell office:value-type="string">
            <text:p>pdf2image</text:p>
          </table:table-cell>
          <table:table-cell office:value-type="string">
            <text:p>1.17.0</text:p>
          </table:table-cell>
          <table:table-cell office:value-type="string">
            <text:p>PDF → image conversion</text:p>
          </table:table-cell>
        </table:table-row>
        <table:table-row>
          <table:table-cell office:value-type="string">
            <text:p>openai</text:p>
          </table:table-cell>
          <table:table-cell office:value-type="string">
            <text:p>2.41.0</text:p>
          </table:table-cell>
          <table:table-cell office:value-type="string">
            <text:p>LLM API client</text:p>
          </table:table-cell>
        </table:table-row>
        <table:table-row>
          <table:table-cell office:value-type="string">
            <text:p>numpy</text:p>
          </table:table-cell>
          <table:table-cell office:value-type="string">
            <text:p>2.4.4</text:p>
          </table:table-cell>
          <table:table-cell office:value-type="string">
            <text:p>Numerical computing</text:p>
          </table:table-cell>
        </table:table-row>
        <table:table-row>
          <table:table-cell office:value-type="string">
            <text:p>API</text:p>
          </table:table-cell>
          <table:table-cell office:value-type="string">
            <text:p>Status</text:p>
          </table:table-cell>
          <table:table-cell office:value-type="string">
            <text:p>Auth Required</text:p>
          </table:table-cell>
        </table:table-row>
        <table:table-row>
          <table:table-cell office:value-type="string">
            <text:p>chessvision.ai `/predict`</text:p>
          </table:table-cell>
          <table:table-cell office:value-type="string">
            <text:p>✅ Working (200 OK, valid FENs)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OpenRouter</text:p>
          </table:table-cell>
          <table:table-cell office:value-type="string">
            <text:p>✅ Configured</text:p>
          </table:table-cell>
          <table:table-cell office:value-type="string">
            <text:p>API key in `.env`</text:p>
          </table:table-cell>
        </table:table-row>
        <table:table-row>
          <table:table-cell office:value-type="string">
            <text:p>Lichess API</text:p>
          </table:table-cell>
          <table:table-cell office:value-type="string">
            <text:p>✅ Working (import route)</text:p>
          </table:table-cell>
          <table:table-cell office:value-type="string">
            <text:p>Optional token</text:p>
          </table:table-cell>
        </table:table-row>
        <table:table-row>
          <table:table-cell office:value-type="string">
            <text:p>Phase</text:p>
          </table:table-cell>
          <table:table-cell office:value-type="string">
            <text:p>Status</text:p>
          </table:table-cell>
          <table:table-cell office:value-type="string">
            <text:p>Blocker</text:p>
          </table:table-cell>
        </table:table-row>
        <table:table-row>
          <table:table-cell office:value-type="string">
            <text:p>Phase 6 (PDF/Vision)</text:p>
          </table:table-cell>
          <table:table-cell office:value-type="string">
            <text:p>✅ **Unblocked** — chessvision.ai integration complete</text:p>
          </table:table-cell>
        </table:table-row>
        <table:table-row>
          <table:table-cell office:value-type="string">
            <text:p>Phase 5 (Maia/Twin Bot)</text:p>
          </table:table-cell>
          <table:table-cell office:value-type="string">
            <text:p>🔶 **Partially blocked** — need lc0 binary + Maia weights</text:p>
          </table:table-cell>
        </table:table-row>
        <table:table-row>
          <table:table-cell office:value-type="string">
            <text:p>Phase 7 (Knowledge Base)</text:p>
          </table:table-cell>
          <table:table-cell office:value-type="string">
            <text:p>✅ **Unblocked** — Qdrant + sentence-transformers installed</text:p>
          </table:table-cell>
        </table:table-row>
        <table:table-row>
          <table:table-cell office:value-type="string">
            <text:p>Phase 8 (Psychological)</text:p>
          </table:table-cell>
          <table:table-cell office:value-type="string">
            <text:p>✅ **Unblocked** — profile_analysis route act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