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Step</text:p>
          </table:table-cell>
          <table:table-cell office:value-type="string">
            <text:p>Before Review</text:p>
          </table:table-cell>
          <table:table-cell office:value-type="string">
            <text:p>After Review (rating=3)</text:p>
          </table:table-cell>
        </table:table-row>
        <table:table-row>
          <table:table-cell office:value-type="string">
            <text:p>due</text:p>
          </table:table-cell>
          <table:table-cell office:value-type="string">
            <text:p>`2026-05-30T07:58:05Z`</text:p>
          </table:table-cell>
          <table:table-cell office:value-type="string">
            <text:p>`2026-06-15T06:00:00Z` ✅</text:p>
          </table:table-cell>
        </table:table-row>
        <table:table-row>
          <table:table-cell office:value-type="string">
            <text:p>stability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view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fficulty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</table:table-row>
        <table:table-row>
          <table:table-cell office:value-type="string">
            <text:p>Item</text:p>
          </table:table-cell>
          <table:table-cell office:value-type="string">
            <text:p>Status</text:p>
          </table:table-cell>
          <table:table-cell office:value-type="string">
            <text:p>Commit</text:p>
          </table:table-cell>
        </table:table-row>
        <table:table-row>
          <table:table-cell office:value-type="string">
            <text:p>Deep project audit</text:p>
          </table:table-cell>
          <table:table-cell office:value-type="string">
            <text:p>✅ Complete</text:p>
          </table:table-cell>
          <table:table-cell office:value-type="string">
            <text:p>`94b89cd`</text:p>
          </table:table-cell>
        </table:table-row>
        <table:table-row>
          <table:table-cell office:value-type="string">
            <text:p>Training cards FSRS</text:p>
          </table:table-cell>
          <table:table-cell office:value-type="string">
            <text:p>✅ Working (not a bug)</text:p>
          </table:table-cell>
          <table:table-cell office:value-type="string">
            <text:p>N/A</text:p>
          </table:table-cell>
        </table:table-row>
        <table:table-row>
          <table:table-cell office:value-type="string">
            <text:p>chessvision.ai integration</text:p>
          </table:table-cell>
          <table:table-cell office:value-type="string">
            <text:p>✅ Complete</text:p>
          </table:table-cell>
          <table:table-cell office:value-type="string">
            <text:p>`6635ffa`</text:p>
          </table:table-cell>
        </table:table-row>
        <table:table-row>
          <table:table-cell office:value-type="string">
            <text:p>Player atom migration</text:p>
          </table:table-cell>
          <table:table-cell office:value-type="string">
            <text:p>✅ Complete</text:p>
          </table:table-cell>
          <table:table-cell office:value-type="string">
            <text:p>`9b590f4`</text:p>
          </table:table-cell>
        </table:table-row>
        <table:table-row>
          <table:table-cell office:value-type="string">
            <text:p>SideBar.Coach label</text:p>
          </table:table-cell>
          <table:table-cell office:value-type="string">
            <text:p>✅ Fixed</text:p>
          </table:table-cell>
          <table:table-cell office:value-type="string">
            <text:p>`fe365f5`</text:p>
          </table:table-cell>
        </table:table-row>
        <table:table-row>
          <table:table-cell office:value-type="string">
            <text:p>DayPlan cards field</text:p>
          </table:table-cell>
          <table:table-cell office:value-type="string">
            <text:p>✅ Fixed</text:p>
          </table:table-cell>
          <table:table-cell office:value-type="string">
            <text:p>`14b693d`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